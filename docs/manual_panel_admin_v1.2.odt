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51cm" fo:margin-left="0.053cm" fo:margin-top="0cm" fo:margin-bottom="0cm" fo:break-before="page" table:align="left" style:writing-mode="page"/>
    </style:style>
    <style:style style:name="Tabla1.A" style:family="table-column">
      <style:table-column-properties style:column-width="16.51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f0fafa" fo:padding-left="0.423cm" fo:padding-right="0.423cm" fo:padding-top="0.318cm" fo:padding-bottom="0.318cm" fo:border-left="3pt solid #42c2ed" fo:border-right="none" fo:border-top="none" fo:border-bottom="none">
        <style:background-image/>
      </style:table-cell-properties>
    </style:style>
    <style:style style:name="Tabla2" style:family="table">
      <style:table-properties style:width="16.51cm" fo:margin-left="0.009cm" fo:margin-top="0cm" fo:margin-bottom="0cm" table:align="left" style:writing-mode="page"/>
    </style:style>
    <style:style style:name="Tabla2.A" style:family="table-column">
      <style:table-column-properties style:column-width="1.411cm"/>
    </style:style>
    <style:style style:name="Tabla2.B" style:family="table-column">
      <style:table-column-properties style:column-width="5.644cm"/>
    </style:style>
    <style:style style:name="Tabla2.C" style:family="table-column">
      <style:table-column-properties style:column-width="9.454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42c2ed" fo:padding="0.212cm" fo:border="0.5pt solid #cccccc">
        <style:background-image/>
      </style:table-cell-properties>
    </style:style>
    <style:style style:name="Tabla2.A2" style:family="table-cell">
      <style:table-cell-properties fo:background-color="#f0fafa" fo:padding-left="0.212cm" fo:padding-right="0.212cm" fo:padding-top="0.176cm" fo:padding-bottom="0.176cm" fo:border="0.5pt solid #cccccc">
        <style:background-image/>
      </style:table-cell-properties>
    </style:style>
    <style:style style:name="Tabla2.A3" style:family="table-cell">
      <style:table-cell-properties fo:background-color="#ffffff" fo:padding-left="0.212cm" fo:padding-right="0.212cm" fo:padding-top="0.176cm" fo:padding-bottom="0.176cm" fo:border="0.5pt solid #cccccc">
        <style:background-image/>
      </style:table-cell-properties>
    </style:style>
    <style:style style:name="Tabla3" style:family="table">
      <style:table-properties style:width="16.51cm" fo:margin-left="0.053cm" fo:margin-top="0cm" fo:margin-bottom="0cm" table:align="left" style:writing-mode="page"/>
    </style:style>
    <style:style style:name="Tabla3.A" style:family="table-column">
      <style:table-column-properties style:column-width="16.51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f0fafa" fo:padding-left="0.423cm" fo:padding-right="0.423cm" fo:padding-top="0.318cm" fo:padding-bottom="0.318cm" fo:border-left="3pt solid #42c2ed" fo:border-right="none" fo:border-top="none" fo:border-bottom="none">
        <style:background-image/>
      </style:table-cell-properties>
    </style:style>
    <style:style style:name="Tabla4" style:family="table">
      <style:table-properties style:width="16.51cm" fo:margin-left="0.009cm" fo:margin-top="0cm" fo:margin-bottom="0cm" table:align="left" style:writing-mode="page"/>
    </style:style>
    <style:style style:name="Tabla4.A" style:family="table-column">
      <style:table-column-properties style:column-width="8.255cm"/>
    </style:style>
    <style:style style:name="Tabla4.B" style:family="table-column">
      <style:table-column-properties style:column-width="8.253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fef3c7" fo:padding="0.212cm" fo:border="0.5pt solid #cccccc">
        <style:background-image/>
      </style:table-cell-properties>
    </style:style>
    <style:style style:name="Tabla4.A2" style:family="table-cell">
      <style:table-cell-properties fo:background-color="#dbeafe" fo:padding="0.212cm" fo:border="0.5pt solid #cccccc">
        <style:background-image/>
      </style:table-cell-properties>
    </style:style>
    <style:style style:name="Tabla4.A3" style:family="table-cell">
      <style:table-cell-properties fo:background-color="#d1fae5" fo:padding="0.212cm" fo:border="0.5pt solid #cccccc">
        <style:background-image/>
      </style:table-cell-properties>
    </style:style>
    <style:style style:name="Tabla4.A4" style:family="table-cell">
      <style:table-cell-properties fo:background-color="#f1f5f9" fo:padding="0.212cm" fo:border="0.5pt solid #cccccc">
        <style:background-image/>
      </style:table-cell-properties>
    </style:style>
    <style:style style:name="Tabla4.A5" style:family="table-cell">
      <style:table-cell-properties fo:background-color="#f8fafc" fo:padding="0.212cm" fo:border="0.5pt solid #cccccc">
        <style:background-image/>
      </style:table-cell-properties>
    </style:style>
    <style:style style:name="Tabla5" style:family="table">
      <style:table-properties style:width="16.51cm" fo:margin-left="0.053cm" fo:margin-top="0cm" fo:margin-bottom="0cm" table:align="left" style:writing-mode="page"/>
    </style:style>
    <style:style style:name="Tabla5.A" style:family="table-column">
      <style:table-column-properties style:column-width="16.51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fef4cc" fo:padding-left="0.423cm" fo:padding-right="0.423cm" fo:padding-top="0.318cm" fo:padding-bottom="0.318cm" fo:border-left="3pt solid #faa61a" fo:border-right="none" fo:border-top="none" fo:border-bottom="none">
        <style:background-image/>
      </style:table-cell-properties>
    </style:style>
    <style:style style:name="Tabla6" style:family="table">
      <style:table-properties style:width="16.51cm" fo:margin-left="0.053cm" fo:margin-top="0cm" fo:margin-bottom="0cm" table:align="left" style:writing-mode="page"/>
    </style:style>
    <style:style style:name="Tabla6.A" style:family="table-column">
      <style:table-column-properties style:column-width="16.51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f0fafa" fo:padding-left="0.423cm" fo:padding-right="0.423cm" fo:padding-top="0.318cm" fo:padding-bottom="0.318cm" fo:border-left="3pt solid #42c2ed" fo:border-right="none" fo:border-top="none" fo:border-bottom="none">
        <style:background-image/>
      </style:table-cell-properties>
    </style:style>
    <style:style style:name="Tabla7" style:family="table">
      <style:table-properties style:width="16.51cm" fo:margin-left="0.053cm" fo:margin-top="0cm" fo:margin-bottom="0cm" table:align="left" style:writing-mode="page"/>
    </style:style>
    <style:style style:name="Tabla7.A" style:family="table-column">
      <style:table-column-properties style:column-width="16.51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fef4cc" fo:padding-left="0.423cm" fo:padding-right="0.423cm" fo:padding-top="0.318cm" fo:padding-bottom="0.318cm" fo:border-left="3pt solid #faa61a" fo:border-right="none" fo:border-top="none" fo:border-bottom="none">
        <style:background-image/>
      </style:table-cell-properties>
    </style:style>
    <style:style style:name="Tabla8" style:family="table">
      <style:table-properties style:width="16.51cm" fo:margin-left="0.053cm" fo:margin-top="0cm" fo:margin-bottom="0cm" table:align="left" style:writing-mode="page"/>
    </style:style>
    <style:style style:name="Tabla8.A" style:family="table-column">
      <style:table-column-properties style:column-width="16.51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f0fafa" fo:padding-left="0.423cm" fo:padding-right="0.423cm" fo:padding-top="0.318cm" fo:padding-bottom="0.318cm" fo:border-left="3pt solid #42c2ed" fo:border-right="none" fo:border-top="none" fo:border-bottom="none">
        <style:background-image/>
      </style:table-cell-properties>
    </style:style>
    <style:style style:name="Tabla9" style:family="table">
      <style:table-properties style:width="16.51cm" fo:margin-left="0.053cm" fo:margin-top="0cm" fo:margin-bottom="0cm" table:align="left" style:writing-mode="page"/>
    </style:style>
    <style:style style:name="Tabla9.A" style:family="table-column">
      <style:table-column-properties style:column-width="16.51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f0fafa" fo:padding-left="0.423cm" fo:padding-right="0.423cm" fo:padding-top="0.318cm" fo:padding-bottom="0.318cm" fo:border-left="3pt solid #42c2ed" fo:border-right="none" fo:border-top="none" fo:border-bottom="none">
        <style:background-image/>
      </style:table-cell-properties>
    </style:style>
    <style:style style:name="Tabla10" style:family="table">
      <style:table-properties style:width="16.51cm" fo:margin-left="0.009cm" fo:margin-top="0cm" fo:margin-bottom="0cm" table:align="left" style:writing-mode="page"/>
    </style:style>
    <style:style style:name="Tabla10.A" style:family="table-column">
      <style:table-column-properties style:column-width="8.255cm"/>
    </style:style>
    <style:style style:name="Tabla10.B" style:family="table-column">
      <style:table-column-properties style:column-width="8.253cm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#42c2ed" fo:padding="0.212cm" fo:border="0.5pt solid #cccccc">
        <style:background-image/>
      </style:table-cell-properties>
    </style:style>
    <style:style style:name="Tabla10.A2" style:family="table-cell">
      <style:table-cell-properties fo:background-color="#f0fafa" fo:padding-left="0.212cm" fo:padding-right="0.212cm" fo:padding-top="0.176cm" fo:padding-bottom="0.176cm" fo:border="0.5pt solid #cccccc">
        <style:background-image/>
      </style:table-cell-properties>
    </style:style>
    <style:style style:name="Tabla10.A3" style:family="table-cell">
      <style:table-cell-properties fo:background-color="#ffffff" fo:padding-left="0.212cm" fo:padding-right="0.212cm" fo:padding-top="0.176cm" fo:padding-bottom="0.176cm" fo:border="0.5pt solid #cccccc">
        <style:background-image/>
      </style:table-cell-properties>
    </style:style>
    <style:style style:name="Tabla11" style:family="table">
      <style:table-properties style:width="16.51cm" fo:margin-left="0.053cm" fo:margin-top="0cm" fo:margin-bottom="0cm" table:align="left" style:writing-mode="page"/>
    </style:style>
    <style:style style:name="Tabla11.A" style:family="table-column">
      <style:table-column-properties style:column-width="16.51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f0fafa" fo:padding-left="0.423cm" fo:padding-right="0.423cm" fo:padding-top="0.318cm" fo:padding-bottom="0.318cm" fo:border-left="3pt solid #42c2ed" fo:border-right="none" fo:border-top="none" fo:border-bottom="none">
        <style:background-image/>
      </style:table-cell-properties>
    </style:style>
    <style:style style:name="Tabla12" style:family="table">
      <style:table-properties style:width="16.51cm" fo:margin-left="0.053cm" fo:margin-top="0cm" fo:margin-bottom="0cm" table:align="left" style:writing-mode="page"/>
    </style:style>
    <style:style style:name="Tabla12.A" style:family="table-column">
      <style:table-column-properties style:column-width="16.51cm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fef4cc" fo:padding-left="0.423cm" fo:padding-right="0.423cm" fo:padding-top="0.318cm" fo:padding-bottom="0.318cm" fo:border-left="3pt solid #faa61a" fo:border-right="none" fo:border-top="none" fo:border-bottom="none">
        <style:background-image/>
      </style:table-cell-properties>
    </style:style>
    <style:style style:name="Tabla13" style:family="table">
      <style:table-properties style:width="16.51cm" fo:margin-left="0.053cm" fo:margin-top="0cm" fo:margin-bottom="0cm" table:align="left" style:writing-mode="page"/>
    </style:style>
    <style:style style:name="Tabla13.A" style:family="table-column">
      <style:table-column-properties style:column-width="16.51cm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fef4cc" fo:padding-left="0.423cm" fo:padding-right="0.423cm" fo:padding-top="0.318cm" fo:padding-bottom="0.318cm" fo:border-left="3pt solid #faa61a" fo:border-right="none" fo:border-top="none" fo:border-bottom="none">
        <style:background-image/>
      </style:table-cell-properties>
    </style:style>
    <style:style style:name="Tabla14" style:family="table">
      <style:table-properties style:width="16.51cm" fo:margin-left="0.009cm" fo:margin-top="0cm" fo:margin-bottom="0cm" table:align="left" style:writing-mode="page"/>
    </style:style>
    <style:style style:name="Tabla14.A" style:family="table-column">
      <style:table-column-properties style:column-width="5.503cm"/>
    </style:style>
    <style:style style:name="Tabla14.1" style:family="table-row">
      <style:table-row-properties fo:keep-together="auto"/>
    </style:style>
    <style:style style:name="Tabla14.A1" style:family="table-cell">
      <style:table-cell-properties fo:background-color="#42c2ed" fo:padding="0.212cm" fo:border="0.5pt solid #cccccc">
        <style:background-image/>
      </style:table-cell-properties>
    </style:style>
    <style:style style:name="Tabla14.A2" style:family="table-cell">
      <style:table-cell-properties fo:background-color="#f0fafa" fo:padding-left="0.212cm" fo:padding-right="0.212cm" fo:padding-top="0.176cm" fo:padding-bottom="0.176cm" fo:border="0.5pt solid #cccccc">
        <style:background-image/>
      </style:table-cell-properties>
    </style:style>
    <style:style style:name="Tabla14.A3" style:family="table-cell">
      <style:table-cell-properties fo:background-color="#ffffff" fo:padding-left="0.212cm" fo:padding-right="0.212cm" fo:padding-top="0.176cm" fo:padding-bottom="0.176cm" fo:border="0.5pt solid #cccccc">
        <style:background-image/>
      </style:table-cell-properties>
    </style:style>
    <style:style style:name="Tabla14.A4" style:family="table-cell">
      <style:table-cell-properties fo:background-color="#fef4cc" fo:padding-left="0.423cm" fo:padding-right="0.423cm" fo:padding-top="0.318cm" fo:padding-bottom="0.318cm" fo:border-left="3pt solid #faa61a" fo:border-right="none" fo:border-top="none" fo:border-bottom="none">
        <style:background-image/>
      </style:table-cell-properties>
    </style:style>
    <style:style style:name="Tabla14.A5" style:family="table-cell">
      <style:table-cell-properties fo:background-color="#f0fafa" fo:padding-left="0.423cm" fo:padding-right="0.423cm" fo:padding-top="0.318cm" fo:padding-bottom="0.318cm" fo:border-left="3pt solid #42c2ed" fo:border-right="none" fo:border-top="none" fo:border-bottom="none">
        <style:background-image/>
      </style:table-cell-properties>
    </style:style>
    <style:style style:name="P1" style:family="paragraph" style:parent-style-name="Heading_20_2">
      <style:paragraph-properties fo:margin-top="0.529cm" fo:margin-bottom="0.265cm" style:contextual-spacing="false"/>
    </style:style>
    <style:style style:name="P2" style:family="paragraph" style:parent-style-name="Heading_20_3">
      <style:paragraph-properties fo:margin-top="0.423cm" fo:margin-bottom="0.212cm" style:contextual-spacing="false"/>
    </style:style>
    <style:style style:name="P3" style:family="paragraph" style:parent-style-name="List_20_Paragraph" style:list-style-name="WWNum2">
      <style:paragraph-properties fo:margin-top="0.106cm" fo:margin-bottom="0.212cm" style:contextual-spacing="false"/>
    </style:style>
    <style:style style:name="P4" style:family="paragraph" style:parent-style-name="List_20_Paragraph" style:list-style-name="WWNum3">
      <style:paragraph-properties fo:margin-top="0.106cm" fo:margin-bottom="0.212cm" style:contextual-spacing="false"/>
    </style:style>
    <style:style style:name="P5" style:family="paragraph" style:parent-style-name="List_20_Paragraph" style:list-style-name="WWNum4">
      <style:paragraph-properties fo:margin-top="0.106cm" fo:margin-bottom="0.212cm" style:contextual-spacing="false"/>
    </style:style>
    <style:style style:name="P6" style:family="paragraph" style:parent-style-name="List_20_Paragraph" style:list-style-name="WWNum5">
      <style:paragraph-properties fo:margin-top="0.106cm" fo:margin-bottom="0.212cm" style:contextual-spacing="false"/>
    </style:style>
    <style:style style:name="P7" style:family="paragraph" style:parent-style-name="List_20_Paragraph" style:list-style-name="WWNum6">
      <style:paragraph-properties fo:margin-top="0.106cm" fo:margin-bottom="0.212cm" style:contextual-spacing="false"/>
    </style:style>
    <style:style style:name="P8" style:family="paragraph" style:parent-style-name="List_20_Paragraph" style:list-style-name="WWNum7">
      <style:paragraph-properties fo:margin-top="0.106cm" fo:margin-bottom="0.212cm" style:contextual-spacing="false"/>
    </style:style>
    <style:style style:name="P9" style:family="paragraph" style:parent-style-name="List_20_Paragraph" style:list-style-name="WWNum8">
      <style:paragraph-properties fo:margin-top="0.106cm" fo:margin-bottom="0.212cm" style:contextual-spacing="false"/>
    </style:style>
    <style:style style:name="P10" style:family="paragraph" style:parent-style-name="Standard">
      <style:paragraph-properties fo:margin-top="0cm" fo:margin-bottom="0.212cm" style:contextual-spacing="false"/>
    </style:style>
    <style:style style:name="P11" style:family="paragraph" style:parent-style-name="Standard">
      <style:paragraph-properties fo:margin-top="0cm" fo:margin-bottom="0.635cm" style:contextual-spacing="false"/>
    </style:style>
    <style:style style:name="P12" style:family="paragraph" style:parent-style-name="Standard">
      <style:paragraph-properties fo:margin-top="0cm" fo:margin-bottom="1.27cm" style:contextual-spacing="false" fo:padding-left="0cm" fo:padding-right="0cm" fo:padding-top="0cm" fo:padding-bottom="0.423cm" fo:border-left="none" fo:border-right="none" fo:border-top="none" fo:border-bottom="1.5pt solid #42c2ed"/>
    </style:style>
    <style:style style:name="P13" style:family="paragraph" style:parent-style-name="Standard">
      <style:paragraph-properties fo:margin-top="0cm" fo:margin-bottom="6.35cm" style:contextual-spacing="false"/>
    </style:style>
    <style:style style:name="P14" style:family="paragraph" style:parent-style-name="Standard">
      <style:paragraph-properties fo:margin-top="0cm" fo:margin-bottom="0.423cm" style:contextual-spacing="false"/>
    </style:style>
    <style:style style:name="P15" style:family="paragraph" style:parent-style-name="Standard">
      <style:paragraph-properties fo:margin-top="0cm" fo:margin-bottom="0.071cm" style:contextual-spacing="false"/>
    </style:style>
    <style:style style:name="P16" style:family="paragraph" style:parent-style-name="Standard">
      <style:paragraph-properties fo:margin-top="0.318cm" fo:margin-bottom="0.318cm" style:contextual-spacing="false" fo:padding-left="0cm" fo:padding-right="0cm" fo:padding-top="0cm" fo:padding-bottom="0.212cm" fo:border-left="none" fo:border-right="none" fo:border-top="none" fo:border-bottom="0.74pt solid #cccccc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margin-top="0.106cm" fo:margin-bottom="0.212cm" style:contextual-spacing="false"/>
    </style:style>
    <style:style style:name="P19" style:family="paragraph" style:parent-style-name="Standard">
      <style:paragraph-properties fo:margin-top="0.071cm" fo:margin-bottom="0.071cm" style:contextual-spacing="false"/>
    </style:style>
    <style:style style:name="P20" style:family="paragraph" style:parent-style-name="Standard">
      <style:paragraph-properties fo:margin-top="0cm" fo:margin-bottom="0.212cm" style:contextual-spacing="false" fo:text-align="end" style:justify-single-word="false"/>
    </style:style>
    <style:style style:name="P21" style:family="paragraph" style:parent-style-name="Standard">
      <style:paragraph-properties fo:margin-top="0.212cm" fo:margin-bottom="0cm" style:contextual-spacing="false">
        <style:tab-stops>
          <style:tab-stop style:position="16.51cm" style:type="right"/>
        </style:tab-stops>
      </style:paragraph-properties>
    </style:style>
    <style:style style:name="P22" style:family="paragraph" style:parent-style-name="Standard" style:master-page-name="Converted1">
      <style:paragraph-properties style:page-number="auto"/>
    </style:style>
    <style:style style:name="P23" style:family="paragraph" style:parent-style-name="Standard">
      <style:paragraph-properties fo:margin-top="0.106cm" fo:margin-bottom="0.212cm" style:contextual-spacing="false"/>
      <style:text-properties officeooo:paragraph-rsid="0004667e"/>
    </style:style>
    <style:style style:name="T1" style:family="text">
      <style:text-properties fo:color="#42c2ed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42c2ed" loext:opacity="100%" style:text-underline-style="solid" style:text-underline-width="auto" style:text-underline-color="font-color"/>
    </style:style>
    <style:style style:name="T3" style:family="text">
      <style:text-properties fo:color="#555555" loext:opacity="100%" fo:font-size="16pt" style:font-size-asian="16pt" style:font-size-complex="16pt"/>
    </style:style>
    <style:style style:name="T4" style:family="text">
      <style:text-properties fo:color="#555555" loext:opacity="100%" fo:font-size="9pt" style:font-size-asian="9pt" style:font-size-complex="9pt"/>
    </style:style>
    <style:style style:name="T5" style:family="text">
      <style:text-properties fo:color="#e91e63" loext:opacity="100%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e91e63" loext:opacity="100%" style:font-name="Courier New" fo:background-color="#f5f5f5" loext:char-shading-value="0" style:font-name-asian="Courier New1" style:font-name-complex="Courier New1"/>
    </style:style>
    <style:style style:name="T7" style:family="text">
      <style:text-properties fo:color="#222222" loext:opacity="100%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222222" loext:opacity="100%"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ffff" loext:opacity="100%" fo:font-weight="bold" style:font-weight-asian="bold" style:font-weight-complex="bold"/>
    </style:style>
    <style:style style:name="T11" style:family="text">
      <style:text-properties fo:color="#78350f" loext:opacity="100%" fo:font-weight="bold" style:font-weight-asian="bold" style:font-weight-complex="bold"/>
    </style:style>
    <style:style style:name="T12" style:family="text">
      <style:text-properties fo:color="#78350f" loext:opacity="100%"/>
    </style:style>
    <style:style style:name="T13" style:family="text">
      <style:text-properties fo:color="#1e3a8a" loext:opacity="100%" fo:font-weight="bold" style:font-weight-asian="bold" style:font-weight-complex="bold"/>
    </style:style>
    <style:style style:name="T14" style:family="text">
      <style:text-properties fo:color="#1e3a8a" loext:opacity="100%"/>
    </style:style>
    <style:style style:name="T15" style:family="text">
      <style:text-properties fo:color="#065f46" loext:opacity="100%" fo:font-weight="bold" style:font-weight-asian="bold" style:font-weight-complex="bold"/>
    </style:style>
    <style:style style:name="T16" style:family="text">
      <style:text-properties fo:color="#065f46" loext:opacity="100%"/>
    </style:style>
    <style:style style:name="T17" style:family="text">
      <style:text-properties fo:color="#334155" loext:opacity="100%" fo:font-weight="bold" style:font-weight-asian="bold" style:font-weight-complex="bold"/>
    </style:style>
    <style:style style:name="T18" style:family="text">
      <style:text-properties fo:color="#334155" loext:opacity="100%"/>
    </style:style>
    <style:style style:name="T19" style:family="text">
      <style:text-properties fo:color="#475569" loext:opacity="100%" fo:font-weight="bold" style:font-weight-asian="bold" style:font-weight-complex="bold"/>
    </style:style>
    <style:style style:name="T20" style:family="text">
      <style:text-properties fo:color="#475569" loext:opacity="100%"/>
    </style:style>
    <style:style style:name="T21" style:family="text">
      <style:text-properties fo:font-style="italic" style:font-style-asian="italic"/>
    </style:style>
    <style:style style:name="T22" style:family="text">
      <style:text-properties officeooo:rsid="0004667e"/>
    </style:style>
    <style:style style:name="T23" style:family="text">
      <style:text-properties fo:color="#c9211e" loext:opacity="100%" officeooo:rsid="0004667e"/>
    </style:style>
    <style:style style:name="T24" style:family="text">
      <style:text-properties fo:color="#c9211e" loext:opacity="100%" style:font-name="Courier New" fo:background-color="#f5f5f5" loext:char-shading-value="0" style:font-name-asian="Courier New1" style:font-name-complex="Courier New1"/>
    </style:style>
    <style:style style:name="T25" style:family="text">
      <style:text-properties fo:color="#c9211e" loext:opacity="100%" style:font-name="Courier New" officeooo:rsid="0004667e" fo:background-color="#f5f5f5" loext:char-shading-value="0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MANUAL DE USUARIO</text:span></text:p>
      <text:p text:style-name="P11"><text:span text:style-name="T3">Panel de Administración</text:span></text:p>
      <text:p text:style-name="P12"/>
      <text:p text:style-name="P13"><text:span text:style-name="T5">Petit Salón · Peluquería Canina</text:span></text:p>
      <text:p text:style-name="P14"><text:span text:style-name="T7">Elaborado para: </text:span><text:span text:style-name="T8">Dueña de Petit Salón </text:span><text:span text:style-name="T7">Versión: </text:span><text:span text:style-name="T8">1.1 (Estable) </text:span><text:span text:style-name="T7">Fecha: </text:span><text:span text:style-name="T8">Mayo 2026</text:span></text:p>
      <text:p text:style-name="P2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><text:span text:style-name="T9">¿Para quién es este manual?</text:span> Para ti, dueña del salón. Aquí encontrarás explicado, paso a paso y en lenguaje sencillo, todo lo que puedes hacer desde tu panel de administración. No necesitas saber de tecnología para entenderlo.</text:p>
          </table:table-cell>
        </table:table-row>
      </table:table>
      <text:p text:style-name="P16"/>
      <text:h text:style-name="P1" text:outline-level="2"><text:bookmark-start text:name="índice-general"/><text:span text:style-name="T9">Índice General</text:span><text:bookmark-end text:name="índice-general"/></text:h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7"><text:span text:style-name="T10">#</text:span></text:p>
          </table:table-cell>
          <table:table-cell table:style-name="Tabla2.A1" office:value-type="string">
            <text:p text:style-name="P17"><text:span text:style-name="T10">Sección</text:span></text:p>
          </table:table-cell>
          <table:table-cell table:style-name="Tabla2.A1" office:value-type="string">
            <text:p text:style-name="P17"><text:span text:style-name="T10">¿Qué puedes hacer?</text:span></text:p>
          </table:table-cell>
        </table:table-row>
        <table:table-row table:style-name="Tabla2.1">
          <table:table-cell table:style-name="Tabla2.A2" office:value-type="string">
            <text:p text:style-name="P17">1</text:p>
          </table:table-cell>
          <table:table-cell table:style-name="Tabla2.A2" office:value-type="string">
            <text:p text:style-name="P17"><text:a xlink:type="simple" xlink:href="#1--inicio-dashboard" text:style-name="ListLabel_20_17" text:visited-style-name="ListLabel_20_17"><text:span text:style-name="T2">🏠 Inicio (Dashboard)</text:span></text:a></text:p>
          </table:table-cell>
          <table:table-cell table:style-name="Tabla2.A2" office:value-type="string">
            <text:p text:style-name="P17">Ver el resumen del día y las próximas citas</text:p>
          </table:table-cell>
        </table:table-row>
        <table:table-row table:style-name="Tabla2.1">
          <table:table-cell table:style-name="Tabla2.A3" office:value-type="string">
            <text:p text:style-name="P17">2</text:p>
          </table:table-cell>
          <table:table-cell table:style-name="Tabla2.A3" office:value-type="string">
            <text:p text:style-name="P17"><text:a xlink:type="simple" xlink:href="#2--agenda" text:style-name="ListLabel_20_17" text:visited-style-name="ListLabel_20_17"><text:span text:style-name="T2">📅 Agenda</text:span></text:a></text:p>
          </table:table-cell>
          <table:table-cell table:style-name="Tabla2.A3" office:value-type="string">
            <text:p text:style-name="P17">Ver tus citas en formato calendario</text:p>
          </table:table-cell>
        </table:table-row>
        <table:table-row table:style-name="Tabla2.1">
          <table:table-cell table:style-name="Tabla2.A2" office:value-type="string">
            <text:p text:style-name="P17">3</text:p>
          </table:table-cell>
          <table:table-cell table:style-name="Tabla2.A2" office:value-type="string">
            <text:p text:style-name="P17"><text:a xlink:type="simple" xlink:href="#3--citas" text:style-name="ListLabel_20_17" text:visited-style-name="ListLabel_20_17"><text:span text:style-name="T2">📋 Citas</text:span></text:a></text:p>
          </table:table-cell>
          <table:table-cell table:style-name="Tabla2.A2" office:value-type="string">
            <text:p text:style-name="P17">Gestionar todas las citas: confirmar, completar, cancelar</text:p>
          </table:table-cell>
        </table:table-row>
        <table:table-row table:style-name="Tabla2.1">
          <table:table-cell table:style-name="Tabla2.A3" office:value-type="string">
            <text:p text:style-name="P17">4</text:p>
          </table:table-cell>
          <table:table-cell table:style-name="Tabla2.A3" office:value-type="string">
            <text:p text:style-name="P17"><text:a xlink:type="simple" xlink:href="#4--perros" text:style-name="ListLabel_20_17" text:visited-style-name="ListLabel_20_17"><text:span text:style-name="T2">🐾 Perros</text:span></text:a></text:p>
          </table:table-cell>
          <table:table-cell table:style-name="Tabla2.A3" office:value-type="string">
            <text:p text:style-name="P17">Ver la ficha de cada perro con su historial</text:p>
          </table:table-cell>
        </table:table-row>
        <table:table-row table:style-name="Tabla2.1">
          <table:table-cell table:style-name="Tabla2.A2" office:value-type="string">
            <text:p text:style-name="P17">5</text:p>
          </table:table-cell>
          <table:table-cell table:style-name="Tabla2.A2" office:value-type="string">
            <text:p text:style-name="P17"><text:a xlink:type="simple" xlink:href="#5--clientes" text:style-name="ListLabel_20_17" text:visited-style-name="ListLabel_20_17"><text:span text:style-name="T2">👤 Clientes</text:span></text:a></text:p>
          </table:table-cell>
          <table:table-cell table:style-name="Tabla2.A2" office:value-type="string">
            <text:p text:style-name="P17">Ver y gestionar la información de los dueños</text:p>
          </table:table-cell>
        </table:table-row>
        <table:table-row table:style-name="Tabla2.1">
          <table:table-cell table:style-name="Tabla2.A3" office:value-type="string">
            <text:p text:style-name="P17">6</text:p>
          </table:table-cell>
          <table:table-cell table:style-name="Tabla2.A3" office:value-type="string">
            <text:p text:style-name="P17"><text:a xlink:type="simple" xlink:href="#6--servicios" text:style-name="ListLabel_20_17" text:visited-style-name="ListLabel_20_17"><text:span text:style-name="T2">✂️ Servicios</text:span></text:a></text:p>
          </table:table-cell>
          <table:table-cell table:style-name="Tabla2.A3" office:value-type="string">
            <text:p text:style-name="P17">Crear y editar los servicios que ofreces</text:p>
          </table:table-cell>
        </table:table-row>
        <table:table-row table:style-name="Tabla2.1">
          <table:table-cell table:style-name="Tabla2.A2" office:value-type="string">
            <text:p text:style-name="P17">7</text:p>
          </table:table-cell>
          <table:table-cell table:style-name="Tabla2.A2" office:value-type="string">
            <text:p text:style-name="P17"><text:a xlink:type="simple" xlink:href="#7--galería" text:style-name="ListLabel_20_17" text:visited-style-name="ListLabel_20_17"><text:span text:style-name="T2">🖼️ Galería</text:span></text:a></text:p>
          </table:table-cell>
          <table:table-cell table:style-name="Tabla2.A2" office:value-type="string">
            <text:p text:style-name="P17">Subir y ordenar las fotos de tu trabajo</text:p>
          </table:table-cell>
        </table:table-row>
        <table:table-row table:style-name="Tabla2.1">
          <table:table-cell table:style-name="Tabla2.A3" office:value-type="string">
            <text:p text:style-name="P17">8</text:p>
          </table:table-cell>
          <table:table-cell table:style-name="Tabla2.A3" office:value-type="string">
            <text:p text:style-name="P17"><text:a xlink:type="simple" xlink:href="#8--reseñas" text:style-name="ListLabel_20_17" text:visited-style-name="ListLabel_20_17"><text:span text:style-name="T2">⭐ Reseñas</text:span></text:a></text:p>
          </table:table-cell>
          <table:table-cell table:style-name="Tabla2.A3" office:value-type="string">
            <text:p text:style-name="P17">Moderar las reseñas antes de publicarlas</text:p>
          </table:table-cell>
        </table:table-row>
        <table:table-row table:style-name="Tabla2.1">
          <table:table-cell table:style-name="Tabla2.A2" office:value-type="string">
            <text:p text:style-name="P17">9</text:p>
          </table:table-cell>
          <table:table-cell table:style-name="Tabla2.A2" office:value-type="string">
            <text:p text:style-name="P17"><text:a xlink:type="simple" xlink:href="#9--campañas-de-email" text:style-name="ListLabel_20_17" text:visited-style-name="ListLabel_20_17"><text:span text:style-name="T2">📧 Campañas de Email</text:span></text:a></text:p>
          </table:table-cell>
          <table:table-cell table:style-name="Tabla2.A2" office:value-type="string">
            <text:p text:style-name="P17">Enviar mensajes masivos a tus clientes</text:p>
          </table:table-cell>
        </table:table-row>
        <table:table-row table:style-name="Tabla2.1">
          <table:table-cell table:style-name="Tabla2.A3" office:value-type="string">
            <text:p text:style-name="P17">10</text:p>
          </table:table-cell>
          <table:table-cell table:style-name="Tabla2.A3" office:value-type="string">
            <text:p text:style-name="P17"><text:a xlink:type="simple" xlink:href="#10--contenido-del-sitio" text:style-name="ListLabel_20_17" text:visited-style-name="ListLabel_20_17"><text:span text:style-name="T2">⚙️ Contenido del Sitio</text:span></text:a></text:p>
          </table:table-cell>
          <table:table-cell table:style-name="Tabla2.A3" office:value-type="string">
            <text:p text:style-name="P17">Editar el texto y datos de tu página web</text:p>
          </table:table-cell>
        </table:table-row>
        <table:table-row table:style-name="Tabla2.1">
          <table:table-cell table:style-name="Tabla2.A2" office:value-type="string">
            <text:p text:style-name="P17">11</text:p>
          </table:table-cell>
          <table:table-cell table:style-name="Tabla2.A2" office:value-type="string">
            <text:p text:style-name="P17"><text:a xlink:type="simple" xlink:href="#11--configuración" text:style-name="ListLabel_20_17" text:visited-style-name="ListLabel_20_17"><text:span text:style-name="T2">🔒 Configuración</text:span></text:a></text:p>
          </table:table-cell>
          <table:table-cell table:style-name="Tabla2.A2" office:value-type="string">
            <text:p text:style-name="P17">Cambiar tu contraseña de acceso al panel</text:p>
          </table:table-cell>
        </table:table-row>
      </table:table>
      <text:p text:style-name="P16"/>
      <text:h text:style-name="P1" text:outline-level="2"><text:bookmark-start text:name="1-inicio-(dashboard)"/><text:span text:style-name="T9">1 · 🏠 Inicio (Dashboard)</text:span><text:bookmark-end text:name="1-inicio-(dashboard)"/></text:h>
      <text:p text:style-name="P23"><text:span text:style-name="T9">Ruta:</text:span> <text:span text:style-name="T23">petitsalon.cl</text:span><text:span text:style-name="T24">/</text:span><text:span text:style-name="T6">/admin</text:span></text:p>
      <text:p text:style-name="P18">El Dashboard es la primera pantalla que ves al ingresar al panel. Es tu <text:span text:style-name="T9">resumen del día</text:span>.</text:p>
      <text:h text:style-name="P2" text:outline-level="3"><text:bookmark-start text:name="¿qué-hay-en-esta-pantalla?"/><text:span text:style-name="T9">¿Qué hay en esta pantalla?</text:span><text:bookmark-end text:name="¿qué-hay-en-esta-pantalla?"/></text:h>
      <text:p text:style-name="P18">#### Tarjetas de métricas rápidas</text:p>
      <text:p text:style-name="P18">Cuatro tarjetas te muestran de un vistazo:</text:p>
      <text:list text:style-name="WWNum2">
        <text:list-item text:start-value="1">
          <text:p text:style-name="P3"><text:span text:style-name="T9">Citas hoy</text:span> — cuántas citas tienes programadas para el día de hoy</text:p>
        </text:list-item>
        <text:list-item>
          <text:p text:style-name="P3"><text:span text:style-name="T9">Próximos 7 días</text:span> — cuántas citas tienes en la semana</text:p>
        </text:list-item>
        <text:list-item>
          <text:p text:style-name="P3"><text:span text:style-name="T9">Clientes</text:span> — el total de dueños registrados en tu sistema</text:p>
        </text:list-item>
        <text:list-item>
          <text:p text:style-name="P3"><text:soft-page-break/><text:span text:style-name="T9">Perritos</text:span> — el total de mascotas registradas</text:p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9">💡 <text:span text:style-name="T9">Truco:</text:span> Puedes hacer clic en cualquier tarjeta para ir directamente a esa sección.</text:p>
          </table:table-cell>
        </table:table-row>
      </table:table>
      <text:p text:style-name="P18">#### Lista de próximas citas</text:p>
      <text:p text:style-name="P18">Debajo de las tarjetas verás la lista de las próximas citas de los próximos 7 días, ordenadas por fecha y hora. Para cada cita puedes ver:</text:p>
      <text:list text:continue-numbering="true" text:style-name="WWNum2">
        <text:list-item>
          <text:p text:style-name="P3">Nombre del perro y su raza</text:p>
        </text:list-item>
        <text:list-item>
          <text:p text:style-name="P3">Nombre del dueño</text:p>
        </text:list-item>
        <text:list-item>
          <text:p text:style-name="P3">Fecha y hora</text:p>
        </text:list-item>
        <text:list-item>
          <text:p text:style-name="P3">Estado de la cita (Agendada, Confirmada, etc.)</text:p>
        </text:list-item>
        <text:list-item>
          <text:p text:style-name="P3">Indicador ✓ WA si ya le enviaste un recordatorio por WhatsApp</text:p>
        </text:list-item>
      </text:list>
      <text:p text:style-name="P16"/>
      <text:h text:style-name="P1" text:outline-level="2"><text:bookmark-start text:name="2--agenda"/><text:span text:style-name="T9">2 · 📅 Agenda</text:span><text:bookmark-end text:name="2--agenda"/></text:h>
      <text:p text:style-name="P18"><text:span text:style-name="T9">Ruta:</text:span> <text:span text:style-name="T23">petitsalon.cl</text:span><text:span text:style-name="T24">/</text:span><text:span text:style-name="T6">admin/agenda</text:span></text:p>
      <text:p text:style-name="P18">La Agenda es tu <text:span text:style-name="T9">calendario visual</text:span>. Funciona muy parecido a Google Calendar.</text:p>
      <text:h text:style-name="P2" text:outline-level="3"><text:bookmark-start text:name="grilla-semanal-y-navegacion"/><text:span text:style-name="T9">Grilla Semanal y Navegación</text:span><text:bookmark-end text:name="grilla-semanal-y-navegacion"/></text:h>
      <text:p text:style-name="P18">La agenda muestra una <text:span text:style-name="T9">grilla semanal completa (Lunes a Domingo)</text:span>. Las horas en el eje vertical se adaptan de forma dinámica según la disponibilidad configurada y las citas agendadas, lo que permite visualizar los sobrecupos sin desperdiciar espacio.</text:p>
      <text:p text:style-name="P18">En la barra superior de acciones puedes utilizar los siguientes botones y controles:</text:p>
      <text:list text:continue-numbering="true" text:style-name="WWNum2">
        <text:list-item>
          <text:p text:style-name="P3"><text:span text:style-name="T9">Selector de Fecha (Mes y Año con flecha ▼): </text:span>Muestra el mes y año en curso. Al hacer clic, abre un calendario interactivo flotante para saltar directamente a cualquier día, mes o año.</text:p>
        </text:list-item>
        <text:list-item>
          <text:p text:style-name="P3"><text:span text:style-name="T9">Flechas de Navegación: </text:span>Permiten avanzar o retroceder una semana a la vez en la visualización.</text:p>
        </text:list-item>
        <text:list-item>
          <text:p text:style-name="P3"><text:span text:style-name="T9">Botón "Hoy": </text:span>Te sitúa instantáneamente en la semana actual y destaca el día de hoy.</text:p>
        </text:list-item>
        <text:list-item>
          <text:p text:style-name="P3"><text:span text:style-name="T9">Botón "Actualizar" (Icono de recarga): </text:span>Fuerza la sincronización y recarga de las citas, bloqueos de horas y reglas de disponibilidad desde el servidor para estar al día con Cal.com (el botón gira animadamente durante la carga).</text:p>
        </text:list-item>
        <text:list-item>
          <text:p text:style-name="P3"><text:span text:style-name="T9">Botón "Pantalla Completa" (Icono de expansión): </text:span>Expande la agenda para ocupar todo el monitor de tu equipo (o tablet), ideal para tener una perspectiva amplia. Al activarse, cambia a un botón rojo "Volver" para salir del modo.</text:p>
        </text:list-item>
        <text:list-item>
          <text:p text:style-name="P3"><text:span text:style-name="T9">Botón "Disponibilidad" (Icono de calendario): </text:span>Te redirige directamente a la configuración de horarios y disponibilidad en tu cuenta de Cal.com en una pestaña nueva.</text:p>
        </text:list-item>
        <text:list-item>
          <text:p text:style-name="P3"><text:span text:style-name="T9">Botón "Agendar Cita" (Icono +): </text:span>Abre el formulario de creación manual de cita sin necesidad de pulsar sobre la grilla.</text:p>
        </text:list-item>
      </text:list>
      <text:h text:style-name="P2" text:outline-level="3"><text:bookmark-start text:name="como-leer-los-colores"/><text:soft-page-break/><text:span text:style-name="T9">Estados y colores de la grilla</text:span><text:bookmark-end text:name="como-leer-los-colores"/></text:h>
      <text:p text:style-name="P18">Cada cita y bloque especial se muestra con colores y diseños específicos en la grilla semanal: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7"><text:span text:style-name="T11">🟡 Amarillo / Ámbar</text:span></text:p>
          </table:table-cell>
          <table:table-cell table:style-name="Tabla4.A1" office:value-type="string">
            <text:p text:style-name="P17"><text:span text:style-name="T12">Cita </text:span><text:span text:style-name="T11">Pendiente</text:span><text:span text:style-name="T12"> de confirmar con el cliente. Registrada en el sistema pero sin validación definitiva.</text:span></text:p>
          </table:table-cell>
        </table:table-row>
        <table:table-row table:style-name="Tabla4.1">
          <table:table-cell table:style-name="Tabla4.A2" office:value-type="string">
            <text:p text:style-name="P17"><text:span text:style-name="T13">🔵 Azul</text:span></text:p>
          </table:table-cell>
          <table:table-cell table:style-name="Tabla4.A2" office:value-type="string">
            <text:p text:style-name="P17"><text:span text:style-name="T14">Cita </text:span><text:span text:style-name="T13">Confirmada</text:span><text:span text:style-name="T14">. Confirmada con el cliente y programada para la atención.</text:span></text:p>
          </table:table-cell>
        </table:table-row>
        <table:table-row table:style-name="Tabla4.1">
          <table:table-cell table:style-name="Tabla4.A3" office:value-type="string">
            <text:p text:style-name="P17"><text:span text:style-name="T15">🟢 Verde</text:span></text:p>
          </table:table-cell>
          <table:table-cell table:style-name="Tabla4.A3" office:value-type="string">
            <text:p text:style-name="P17"><text:span text:style-name="T16">Cita </text:span><text:span text:style-name="T15">Realizada</text:span><text:span text:style-name="T16"> (Atendida). El servicio fue completado con éxito, guardando notas e historial del perro.</text:span></text:p>
          </table:table-cell>
        </table:table-row>
        <table:table-row table:style-name="Tabla4.1">
          <table:table-cell table:style-name="Tabla4.A4" office:value-type="string">
            <text:p text:style-name="P17"><text:span text:style-name="T17">🪨 Gris / Pizarra</text:span></text:p>
          </table:table-cell>
          <table:table-cell table:style-name="Tabla4.A4" office:value-type="string">
            <text:p text:style-name="P17"><text:span text:style-name="T18">Horario </text:span><text:span text:style-name="T17">Bloqueado</text:span><text:span text:style-name="T18">. Bloque especial que indica que ese periodo no está disponible para reservas automáticas (puede ser local o sincronizado de Cal.com).</text:span></text:p>
          </table:table-cell>
        </table:table-row>
        <table:table-row table:style-name="Tabla4.1">
          <table:table-cell table:style-name="Tabla4.A5" office:value-type="string">
            <text:p text:style-name="P17"><text:span text:style-name="T19">🏁 Fondo Rayado</text:span></text:p>
          </table:table-cell>
          <table:table-cell table:style-name="Tabla4.A5" office:value-type="string">
            <text:p text:style-name="P17"><text:span text:style-name="T20">Horario </text:span><text:span text:style-name="T19">Fuera de Disponibilidad</text:span><text:span text:style-name="T20">. Bloques fuera del horario laboral estándar establecido en Cal.com. Es posible agendar citas sobre cupo en estas celdas.</text:span></text:p>
          </table:table-cell>
        </table:table-row>
      </table:table>
      <text:p text:style-name="P18"><text:span text:style-name="T21">Nota: Las citas en estado "Cancelada" no se despliegan en la grilla semanal de la agenda para mantener el orden y la claridad visual. Sin embargo, siguen estando disponibles y registradas en la sección de Citas general.</text:span></text:p>
      <text:h text:style-name="P2" text:outline-level="3"><text:bookmark-start text:name="acciones-e-interacciones"/><text:span text:style-name="T9">¿Qué puedo hacer en la agenda?</text:span><text:bookmark-end text:name="acciones-e-interacciones"/></text:h>
      <text:list text:continue-numbering="true" text:style-name="WWNum2">
        <text:list-item>
          <text:p text:style-name="P3"><text:span text:style-name="T9">Hacer clic en una cita: </text:span>Abre el panel emergente con la ficha detallada (datos del perro, dueño, servicio, horario y notas). Permite confirmar, completar (para registrar notas y fotos del servicio), revertir el estado o gestionar la cancelación.</text:p>
        </text:list-item>
        <text:list-item>
          <text:p text:style-name="P3"><text:span text:style-name="T9">Hacer clic en una celda vacía: </text:span>Despliega un menú contextual flotante en el lugar exacto. Permite seleccionar "Agendar Cita" (o "Agendar Cita (Sobre Cupo)" si está fuera de horario disponible) y "Bloquear Horario".</text:p>
        </text:list-item>
        <text:list-item>
          <text:p text:style-name="P3"><text:span text:style-name="T9">Hacer clic en un bloqueador de horario: </text:span>Abre el modal de detalles del bloqueo mostrando su origen (Local o Cal.com). Permite eliminar el bloqueo para liberar esa hora.</text:p>
        </text:list-item>
      </text:list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9">⚠️ <text:span text:style-name="T9">Importante:</text:span> Las nuevas citas se crean automáticamente cuando un cliente reserva a través de Cal.com. No obstante, en caso de necesidad o urgencia, la administradora puede agendar citas de forma manual o sobre cupo desde la agenda.</text:p>
          </table:table-cell>
        </table:table-row>
      </table:table>
      <text:p text:style-name="P16"/>
      <text:h text:style-name="P1" text:outline-level="2"><text:bookmark-start text:name="3--citas"/><text:span text:style-name="T9">3 · 📋 Citas</text:span><text:bookmark-end text:name="3--citas"/></text:h>
      <text:p text:style-name="P23"><text:soft-page-break/><text:span text:style-name="T9">Ruta:</text:span> <text:span text:style-name="T23">petitsalon.cl</text:span><text:span text:style-name="T6">/admin/citas</text:span></text:p>
      <text:p text:style-name="P18">La sección de Citas es la <text:span text:style-name="T9">lista completa</text:span> de todas tus citas, con filtros y acciones de gestión.</text:p>
      <text:h text:style-name="P2" text:outline-level="3"><text:bookmark-start text:name="3--citas Copia 1"/><text:span text:style-name="T9">Filtrar citas por estado</text:span><text:bookmark-end text:name="3--citas Copia 1"/></text:h>
      <text:p text:style-name="P18">En la parte superior hay pestañas para ver solo las citas que te interesan:</text:p>
      <text:list text:continue-numbering="true" text:style-name="WWNum2">
        <text:list-item>
          <text:p text:style-name="P3"><text:span text:style-name="T9">Todas</text:span> — muestra todas sin filtrar</text:p>
        </text:list-item>
        <text:list-item>
          <text:p text:style-name="P3"><text:span text:style-name="T9">Agendadas</text:span> — citas creadas pero sin confirmar</text:p>
        </text:list-item>
        <text:list-item>
          <text:p text:style-name="P3"><text:span text:style-name="T9">Confirmadas</text:span> — citas que ya confirmaste con el cliente</text:p>
        </text:list-item>
        <text:list-item>
          <text:p text:style-name="P3"><text:span text:style-name="T9">Realizadas</text:span> — citas completadas</text:p>
        </text:list-item>
        <text:list-item>
          <text:p text:style-name="P3"><text:span text:style-name="T9">Canceladas</text:span> — citas que fueron canceladas</text:p>
        </text:list-item>
      </text:list>
      <text:h text:style-name="P2" text:outline-level="3"><text:bookmark-start text:name="buscar-una-cita-específica"/><text:span text:style-name="T9">Buscar una cita específica</text:span><text:bookmark-end text:name="buscar-una-cita-específica"/></text:h>
      <text:p text:style-name="P18">Usa el buscador para escribir el nombre del perro o del dueño y filtrar al instante.</text:p>
      <text:h text:style-name="P2" text:outline-level="3"><text:bookmark-start text:name="ver-el-detalle-de-una-cita"/><text:span text:style-name="T9">Ver el detalle de una cita</text:span><text:bookmark-end text:name="ver-el-detalle-de-una-cita"/></text:h>
      <text:p text:style-name="P18">Haz clic en cualquier fila para abrir un panel con toda la información de la cita: datos del perro, datos del dueño, servicio, fecha, notas y estado.</text:p>
      <text:h text:style-name="P2" text:outline-level="3"><text:bookmark-start text:name="cambiar-el-estado-de-una-cita"/><text:span text:style-name="T9">Cambiar el estado de una cita</text:span><text:bookmark-end text:name="cambiar-el-estado-de-una-cita"/></text:h>
      <text:p text:style-name="P18">#### Cita Pendiente / Agendada (amarilla) → puedes:</text:p>
      <text:list text:continue-numbering="true" text:style-name="WWNum2">
        <text:list-item>
          <text:p text:style-name="P3"><text:span text:style-name="T9">Confirmar</text:span> — para marcarla como confirmada (cambia a azul)</text:p>
        </text:list-item>
        <text:list-item>
          <text:p text:style-name="P3"><text:span text:style-name="T9">Cancelar</text:span> — cancela la cita directamente (cambia a estado Cancelada y deja de mostrarse en la agenda semanal)</text:p>
        </text:list-item>
      </text:list>
      <text:p text:style-name="P18">#### Cita Confirmada (azul) → puedes:</text:p>
      <text:list xml:id="list114633722400210" text:continue-numbering="true" text:style-name="WWNum2">
        <text:list-item>
          <text:p text:style-name="P3"><text:span text:style-name="T9">Completar</text:span> — para marcarla como Realizada. Se te pedirá registrar notas y fotos del servicio</text:p>
        </text:list-item>
        <text:list-item>
          <text:p text:style-name="P3"><text:span text:style-name="T9">Revertir</text:span> — vuelve al estado Pendiente/Agendada si hubo un error (cambia a amarillo)</text:p>
        </text:list-item>
        <text:list-item>
          <text:p text:style-name="P3"><text:span text:style-name="T9">Cancelar</text:span> — cancela la cita directamente (cambia a estado Cancelada)</text:p>
        </text:list-item>
      </text:list>
      <text:p text:style-name="P18">#### Cuando marcas una cita como Realizada:</text:p>
      <text:list text:style-name="WWNum3">
        <text:list-item text:start-value="1">
          <text:p text:style-name="P4">Se abre un formulario para agregar notas y fotos (antes/después)</text:p>
        </text:list-item>
        <text:list-item>
          <text:p text:style-name="P4">El sistema automáticamente le ofrece al cliente un link para dejar su reseña</text:p>
        </text:list-item>
      </text:list>
      <text:h text:style-name="P2" text:outline-level="3"><text:bookmark-start text:name="paginación"/><text:span text:style-name="T9">Paginación</text:span><text:bookmark-end text:name="paginación"/></text:h>
      <text:p text:style-name="P18">Si tienes muchas citas, verás botones de "Anterior" y "Siguiente" para navegar entre páginas.</text:p>
      <text:p text:style-name="P16"/>
      <text:h text:style-name="P1" text:outline-level="2"><text:bookmark-start text:name="4--perros"/><text:span text:style-name="T9">4 · 🐾 Perros</text:span><text:bookmark-end text:name="4--perros"/></text:h>
      <text:p text:style-name="P23"><text:span text:style-name="T9">Ruta:</text:span> <text:span text:style-name="T23">petitsalon.cl</text:span><text:span text:style-name="T24">/</text:span><text:span text:style-name="T6">admin/perros</text:span></text:p>
      <text:p text:style-name="P18"><text:soft-page-break/>Aquí está la <text:span text:style-name="T9">ficha de cada mascota</text:span> que ha pasado por tu salón.</text:p>
      <text:h text:style-name="P2" text:outline-level="3"><text:bookmark-start text:name="4--perros Copia 1"/><text:span text:style-name="T9">Lista de perros</text:span><text:bookmark-end text:name="4--perros Copia 1"/></text:h>
      <text:p text:style-name="P18">Ves todos los perros registrados con su nombre, raza y dueño.</text:p>
      <text:h text:style-name="P2" text:outline-level="3"><text:bookmark-start text:name="ficha-individual-de-un-perro"/><text:span text:style-name="T9">Ficha individual de un perro</text:span><text:bookmark-end text:name="ficha-individual-de-un-perro"/></text:h>
      <text:p text:style-name="P18">Al hacer clic en un perro, accedes a su ficha completa que incluye:</text:p>
      <text:list text:continue-list="list114633722400210" text:style-name="WWNum2">
        <text:list-item>
          <text:p text:style-name="P3"><text:span text:style-name="T9">Datos básicos:</text:span> nombre, raza, edad, peso, fecha de nacimiento</text:p>
        </text:list-item>
        <text:list-item>
          <text:p text:style-name="P3"><text:span text:style-name="T9">Foto de perfil</text:span></text:p>
        </text:list-item>
        <text:list-item>
          <text:p text:style-name="P3"><text:span text:style-name="T9">Notas especiales:</text:span> alergias, temperamento, comportamiento (muy importante para su cuidado)</text:p>
        </text:list-item>
        <text:list-item>
          <text:p text:style-name="P3"><text:span text:style-name="T9">Historial de atenciones:</text:span> todas las veces que el perro ha venido al salón, con las notas y fotos de cada visita</text:p>
        </text:list-item>
        <text:list-item>
          <text:p text:style-name="P3"><text:span text:style-name="T9">Fotos antes/después:</text:span> las fotos que subiste al completar cada cita</text:p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9">💡 Las fichas se crean automáticamente cuando un cliente reserva por primera vez. Si el perro vuelve, su historial se va acumulando.</text:p>
          </table:table-cell>
        </table:table-row>
      </table:table>
      <text:p text:style-name="P16"/>
      <text:h text:style-name="P1" text:outline-level="2"><text:bookmark-start text:name="5--clientes"/><text:span text:style-name="T9">5 · 👤 Clientes</text:span><text:bookmark-end text:name="5--clientes"/></text:h>
      <text:p text:style-name="P23"><text:span text:style-name="T9">Ruta:</text:span> <text:span text:style-name="T23">petitsalon.cl</text:span><text:span text:style-name="T24">/</text:span><text:span text:style-name="T6">admin/clientes</text:span></text:p>
      <text:p text:style-name="P18">Aquí puedes ver la información de todos los <text:span text:style-name="T9">dueños de mascotas</text:span> que han usado tus servicios.</text:p>
      <text:h text:style-name="P2" text:outline-level="3"><text:bookmark-start text:name="5--clientes Copia 1"/><text:span text:style-name="T9">Lista de clientes</text:span><text:bookmark-end text:name="5--clientes Copia 1"/></text:h>
      <text:p text:style-name="P18">Ves todos los clientes con su nombre, teléfono y correo electrónico.</text:p>
      <text:h text:style-name="P2" text:outline-level="3"><text:bookmark-start text:name="detalle-de-un-cliente"/><text:span text:style-name="T9">Detalle de un cliente</text:span><text:bookmark-end text:name="detalle-de-un-cliente"/></text:h>
      <text:p text:style-name="P18">Al hacer clic en un cliente, puedes ver:</text:p>
      <text:list text:continue-numbering="true" text:style-name="WWNum2">
        <text:list-item>
          <text:p text:style-name="P3">Sus datos de contacto (nombre, teléfono, email)</text:p>
        </text:list-item>
        <text:list-item>
          <text:p text:style-name="P3">Sus mascotas registradas</text:p>
        </text:list-item>
        <text:list-item>
          <text:p text:style-name="P3">Su historial de citas</text:p>
        </text:list-item>
      </text:list>
      <text:h text:style-name="P2" text:outline-level="3"><text:bookmark-start text:name="crear-un-cliente-manualmente"/><text:span text:style-name="T9">Crear un cliente manualmente</text:span><text:bookmark-end text:name="crear-un-cliente-manualmente"/></text:h>
      <text:p text:style-name="P18">Si necesitas registrar un cliente que no hizo su reserva por Cal.com, puedes hacerlo con el botón <text:span text:style-name="T9">"Nuevo cliente"</text:span>. Solo necesitas ingresar:</text:p>
      <text:list text:continue-numbering="true" text:style-name="WWNum2">
        <text:list-item>
          <text:p text:style-name="P3">Nombre</text:p>
        </text:list-item>
        <text:list-item>
          <text:p text:style-name="P3">Teléfono (obligatorio — es el identificador principal)</text:p>
        </text:list-item>
        <text:list-item>
          <text:p text:style-name="P3">Email (opcional)</text:p>
        </text:list-item>
      </text:list>
      <table:table table:name="Tabla7" table:style-name="Tabla7">
        <table:table-column table:style-name="Tabla7.A"/>
        <text:soft-page-break/>
        <table:table-row table:style-name="Tabla7.1">
          <table:table-cell table:style-name="Tabla7.A1" office:value-type="string">
            <text:p text:style-name="P19">⚠️ <text:span text:style-name="T9">Nota:</text:span> El teléfono no puede repetirse. Cada número identifica a una persona única en el sistema.</text:p>
          </table:table-cell>
        </table:table-row>
      </table:table>
      <text:p text:style-name="P16"/>
      <text:h text:style-name="P1" text:outline-level="2"><text:bookmark-start text:name="6--servicios"/><text:span text:style-name="T9">6 · ✂️ Servicios</text:span><text:bookmark-end text:name="6--servicios"/></text:h>
      <text:p text:style-name="P23"><text:span text:style-name="T9">Ruta:</text:span> <text:span text:style-name="T23">petitsalon.cl</text:span><text:span text:style-name="T24">/</text:span><text:span text:style-name="T6">admin/servicios</text:span></text:p>
      <text:p text:style-name="P18">Aquí creas y editas los <text:span text:style-name="T9">servicios que ofrece tu salón</text:span> (baño, corte, etc.).</text:p>
      <text:h text:style-name="P2" text:outline-level="3"><text:bookmark-start text:name="6--servicios Copia 1"/><text:span text:style-name="T9">Ver los servicios</text:span><text:bookmark-end text:name="6--servicios Copia 1"/></text:h>
      <text:p text:style-name="P18">Los servicios se muestran agrupados por categoría (si las tienes configuradas).</text:p>
      <text:h text:style-name="P2" text:outline-level="3"><text:bookmark-start text:name="crear-un-nuevo-servicio"/><text:span text:style-name="T9">Crear un nuevo servicio</text:span><text:bookmark-end text:name="crear-un-nuevo-servicio"/></text:h>
      <text:p text:style-name="P18">Haz clic en <text:span text:style-name="T9">"Nuevo servicio"</text:span> y completa:</text:p>
      <text:list text:continue-numbering="true" text:style-name="WWNum2">
        <text:list-item>
          <text:p text:style-name="P3"><text:span text:style-name="T9">Nombre</text:span> del servicio (ej: "Baño + Corte completo")</text:p>
        </text:list-item>
        <text:list-item>
          <text:p text:style-name="P3"><text:span text:style-name="T9">Precio</text:span> en pesos chilenos (CLP)</text:p>
        </text:list-item>
        <text:list-item>
          <text:p text:style-name="P3"><text:span text:style-name="T9">Duración</text:span> en minutos</text:p>
        </text:list-item>
        <text:list-item>
          <text:p text:style-name="P3"><text:span text:style-name="T9">Descripción</text:span> (opcional — aparece en tu página web)</text:p>
        </text:list-item>
        <text:list-item>
          <text:p text:style-name="P3"><text:span text:style-name="T9">Categoría</text:span> (opcional — para agrupar servicios similares)</text:p>
        </text:list-item>
        <text:list-item>
          <text:p text:style-name="P3"><text:span text:style-name="T9">Vinculación con Cal.com</text:span> (automática — no necesitas ingresar ningún enlace)</text:p>
        </text:list-item>
      </text:list>
      <text:h text:style-name="P2" text:outline-level="3"><text:bookmark-start text:name="editar-o-eliminar-un-servicio"/><text:span text:style-name="T9">Editar o eliminar un servicio</text:span><text:bookmark-end text:name="editar-o-eliminar-un-servicio"/></text:h>
      <text:p text:style-name="P18">Cada servicio tiene botones de <text:span text:style-name="T9">Editar</text:span> (lápiz) y <text:span text:style-name="T9">Eliminar</text:span> (papelera).</text:p>
      <text:h text:style-name="P2" text:outline-level="3"><text:bookmark-start text:name="activar-o-desactivar-un-servicio"/><text:span text:style-name="T9">Activar o desactivar un servicio</text:span><text:bookmark-end text:name="activar-o-desactivar-un-servicio"/></text:h>
      <text:p text:style-name="P18">Puedes ocultar un servicio de la página pública sin eliminarlo, usando el interruptor de <text:span text:style-name="T9">Activo/Inactivo</text:span>.</text:p>
      <text:h text:style-name="P2" text:outline-level="3"><text:bookmark-start text:name="6--servicios Copia 2"/><text:span text:style-name="T9">Ordenar los servicios</text:span><text:bookmark-end text:name="6--servicios Copia 2"/></text:h>
      <text:p text:style-name="P18">Puedes cambiar el orden en que aparecen los servicios con los botones de flecha ↑ ↓.</text:p>
      <text:h text:style-name="P2" text:outline-level="3"><text:bookmark-start text:name="6--servicios Copia 3"/><text:span text:style-name="T9">Categorías de servicios</text:span><text:bookmark-end text:name="6--servicios Copia 3"/></text:h>
      <text:p text:style-name="P18">También puedes crear <text:span text:style-name="T9">categorías</text:span> para agrupar tus servicios (ej: "Baños", "Cortes", "Tratamientos"). Las categorías también se pueden ordenar y activar/desactivar.</text:p>
      <text:p text:style-name="P16"/>
      <text:h text:style-name="P2" text:outline-level="3"><text:bookmark-start text:name="sincronizacion-automatica-con-cal-com"/><text:soft-page-break/><text:span text:style-name="T9">🔄 Sincronización Automática con Cal.com</text:span><text:bookmark-end text:name="sincronizacion-automatica-con-cal-com"/></text:h>
      <text:p text:style-name="P18">La vinculación con Cal.com es <text:span text:style-name="T9">100% automática</text:span>. Ya no es necesario que entres a Cal.com a duplicar eventos ni a copiar y pegar enlaces manuales. Al crear o modificar un servicio en este panel, el sistema se comunica directamente con Cal.com para realizar toda la configuración técnica por ti.</text:p>
      <text:p text:style-name="P18"><text:span text:style-name="T9">Cómo funciona el proceso automático:</text:span></text:p>
      <text:list xml:id="list114633116611988" text:continue-numbering="true" text:style-name="WWNum2">
        <text:list-item>
          <text:p text:style-name="P3"><text:span text:style-name="T9">1. Creación del Evento Principal:</text:span> Al guardar un nuevo servicio (ej: "Corte de Pelo"), el sistema crea automáticamente el evento correspondiente en Cal.com con el nombre, duración y descripción que ingresaste.</text:p>
        </text:list-item>
        <text:list-item>
          <text:p text:style-name="P3"><text:span text:style-name="T9">2. Evento de Sobrecupo Oculto:</text:span> De forma simultánea y transparente, el sistema crea un segundo evento oculto en Cal.com configurado específicamente para gestionar las citas fuera del horario normal (sobrecupos) utilizando la agenda especial de sobrecupos.</text:p>
        </text:list-item>
        <text:list-item>
          <text:p text:style-name="P3"><text:span text:style-name="T9">3. Sincronización en Tiempo Real:</text:span> Si editas la duración, el nombre o la descripción de un servicio, los cambios se actualizan de inmediato en Cal.com de forma automática.</text:p>
        </text:list-item>
        <text:list-item>
          <text:p text:style-name="P3"><text:span text:style-name="T9">4. Enlace Automático:</text:span> El sistema obtiene los enlaces de reserva de Cal.com y los asocia al servicio para que tus clientes puedan reservar desde la web sin que tengas que pegar nada.</text:p>
        </text:list-item>
      </text:list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9">💡 <text:span text:style-name="T9">Consejo:</text:span> Si necesitas suspender temporalmente las reservas de un servicio sin borrarlo, te recomendamos desactivarlo usando el interruptor "Activo/Inactivo" en este mismo panel. Esto evitará que se muestre en tu web inmediatamente.</text:p>
          </table:table-cell>
        </table:table-row>
      </table:table>
      <text:p text:style-name="P16"/>
      <text:h text:style-name="P2" text:outline-level="3"><text:bookmark-start text:name="�-cómo-cambiar-los-horarios-disponibles-en-cal-com"/><text:span text:style-name="T9">🕐 Cómo cambiar los horarios disponibles en Cal.com</text:span><text:bookmark-end text:name="�-cómo-cambiar-los-horarios-disponibles-en-cal-com"/></text:h>
      <text:p text:style-name="P18">Los horarios en los que tus clientes pueden reservar <text:span text:style-name="T9">se gestionan directamente en Cal.com</text:span>, no desde el panel de Petit Salón.</text:p>
      <text:p text:style-name="P18"><text:span text:style-name="T9">Para cambiar tus horas disponibles:</text:span></text:p>
      <text:list text:style-name="WWNum4">
        <text:list-item text:start-value="1">
          <text:p text:style-name="P5">Entra a <text:a xlink:type="simple" xlink:href="https://app.cal.com" text:style-name="ListLabel_20_17" text:visited-style-name="ListLabel_20_17"><text:span text:style-name="T2">app.cal.com</text:span></text:a></text:p>
        </text:list-item>
        <text:list-item>
          <text:p text:style-name="P5">Ve al menú <text:span text:style-name="T9">"Disponibilidad"</text:span> (Availability) en el panel izquierdo</text:p>
        </text:list-item>
        <text:list-item>
          <text:p text:style-name="P5">Verás tu horario actual. Puedes:</text:p>
        </text:list-item>
      </text:list>
      <text:list xml:id="list114633779702700" text:continue-list="list114633116611988" text:style-name="WWNum2">
        <text:list-item>
          <text:p text:style-name="P3"><text:span text:style-name="T9">Marcar o desmarcar días</text:span> de la semana en que atiendes</text:p>
        </text:list-item>
        <text:list-item>
          <text:p text:style-name="P3"><text:span text:style-name="T9">Cambiar el rango de horas</text:span> de cada día (ej: de 09:00 a 18:00)</text:p>
        </text:list-item>
        <text:list-item>
          <text:p text:style-name="P3"><text:span text:style-name="T9">Agregar bloques de tiempo distintos</text:span> para días específicos (ej: el viernes solo de mañana)</text:p>
        </text:list-item>
      </text:list>
      <text:list text:style-name="WWNum5">
        <text:list-item text:start-value="1">
          <text:p text:style-name="P6">Guarda los cambios con el botón <text:span text:style-name="T9">"Guardar"</text:span></text:p>
        </text:list-item>
      </text:list>
      <text:p text:style-name="P18"><text:span text:style-name="T9">Para bloquear días específicos (vacaciones, feriados):</text:span></text:p>
      <text:list text:style-name="WWNum6">
        <text:list-item text:start-value="1">
          <text:p text:style-name="P7">En Cal.com, ve a <text:span text:style-name="T9">"Disponibilidad"</text:span></text:p>
        </text:list-item>
        <text:list-item>
          <text:p text:style-name="P7"><text:soft-page-break/>Busca la sección <text:span text:style-name="T9">"Fechas bloqueadas"</text:span> o <text:span text:style-name="T9">"Date Overrides"</text:span></text:p>
        </text:list-item>
        <text:list-item>
          <text:p text:style-name="P7">Agrega la fecha o rango de fechas en que no atenderás</text:p>
        </text:list-item>
        <text:list-item>
          <text:p text:style-name="P7">Los clientes no podrán reservar en esos días</text:p>
        </text:list-item>
      </text:list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9">💡 Los cambios en Cal.com se aplican inmediatamente. Los clientes verán las nuevas horas disponibles en cuanto guardes.</text:p>
          </table:table-cell>
        </table:table-row>
      </table:table>
      <text:p text:style-name="P16"/>
      <text:h text:style-name="P1" text:outline-level="2"><text:bookmark-start text:name="7--galería"/><text:span text:style-name="T9">7 · 🖼️ Galería</text:span><text:bookmark-end text:name="7--galería"/></text:h>
      <text:p text:style-name="P23"><text:span text:style-name="T9">Ruta:</text:span> <text:span text:style-name="T23">petitsalon.cl</text:span><text:span text:style-name="T24">/</text:span><text:span text:style-name="T6">admin/galeria</text:span></text:p>
      <text:p text:style-name="P18">Aquí gestionas las <text:span text:style-name="T9">fotos que aparecen en la galería de tu página web</text:span>.</text:p>
      <text:h text:style-name="P2" text:outline-level="3"><text:bookmark-start text:name="subir-fotos"/><text:span text:style-name="T9">Subir fotos</text:span><text:bookmark-end text:name="subir-fotos"/></text:h>
      <text:p text:style-name="P18">Haz clic en <text:span text:style-name="T9">"Subir foto"</text:span> y selecciona una imagen desde tu teléfono o computadora. El sistema la comprime automáticamente antes de subirla para que todo funcione rápido.</text:p>
      <text:h text:style-name="P2" text:outline-level="3"><text:bookmark-start text:name="editar-una-foto"/><text:span text:style-name="T9">Editar una foto</text:span><text:bookmark-end text:name="editar-una-foto"/></text:h>
      <text:p text:style-name="P18">Cada foto tiene opciones para:</text:p>
      <text:list xml:id="list114633877972716" text:continue-list="list114633779702700" text:style-name="WWNum2">
        <text:list-item>
          <text:p text:style-name="P3">Cambiar el <text:span text:style-name="T9">pie de foto</text:span> (el texto que aparece debajo de la imagen)</text:p>
        </text:list-item>
        <text:list-item>
          <text:p text:style-name="P3">Cambiarla de <text:span text:style-name="T9">orden</text:span> con las flechas ↑ ↓</text:p>
        </text:list-item>
        <text:list-item>
          <text:p text:style-name="P3"><text:span text:style-name="T9">Mostrar u ocultar</text:span> la foto en la página web sin eliminarla</text:p>
        </text:list-item>
        <text:list-item>
          <text:p text:style-name="P3"><text:span text:style-name="T9">Eliminar</text:span> la foto definitivamente</text:p>
        </text:list-item>
      </text:list>
      <text:h text:style-name="P2" text:outline-level="3"><text:bookmark-start text:name="visibilidad"/><text:span text:style-name="T9">Visibilidad</text:span><text:bookmark-end text:name="visibilidad"/></text:h>
      <text:p text:style-name="P18">Una foto con el ojo 👁 activo es <text:span text:style-name="T9">visible</text:span> en tu página. Si la ocultas, desaparece de la galería pública pero sigue guardada en tu sistema.</text:p>
      <text:p text:style-name="P16"/>
      <text:h text:style-name="P1" text:outline-level="2"><text:bookmark-start text:name="8--reseñas"/><text:span text:style-name="T9">8 · ⭐ Reseñas</text:span><text:bookmark-end text:name="8--reseñas"/></text:h>
      <text:p text:style-name="P23"><text:span text:style-name="T9">Ruta:</text:span> <text:span text:style-name="T25">petitsalon.cl</text:span><text:span text:style-name="T24">/</text:span><text:span text:style-name="T6">admin/resenas</text:span></text:p>
      <text:p text:style-name="P18">Aquí moderas las <text:span text:style-name="T9">reseñas que dejan tus clientes</text:span> antes de que aparezcan públicamente.</text:p>
      <text:h text:style-name="P2" text:outline-level="3"><text:bookmark-start text:name="8--reseñas Copia 1"/><text:span text:style-name="T9">¿Cómo llegan las reseñas?</text:span><text:bookmark-end text:name="8--reseñas Copia 1"/></text:h>
      <text:list text:style-name="WWNum7">
        <text:list-item text:start-value="1">
          <text:p text:style-name="P8">Tú marcas una cita como <text:span text:style-name="T9">Realizada</text:span></text:p>
        </text:list-item>
        <text:list-item>
          <text:p text:style-name="P8">El sistema genera automáticamente un enlace único y se lo puedes compartir al cliente por WhatsApp</text:p>
        </text:list-item>
        <text:list-item>
          <text:p text:style-name="P8">El cliente entra al enlace, deja su calificación de estrellas y un comentario</text:p>
        </text:list-item>
        <text:list-item>
          <text:p text:style-name="P8"><text:soft-page-break/>La reseña llega aquí en estado <text:span text:style-name="T9">Pendiente</text:span></text:p>
        </text:list-item>
      </text:list>
      <text:h text:style-name="P2" text:outline-level="3"><text:bookmark-start text:name="el-tablero-kanban"/><text:span text:style-name="T9">El tablero Kanban</text:span><text:bookmark-end text:name="el-tablero-kanban"/></text:h>
      <text:p text:style-name="P18">Las reseñas se muestran en tres columnas: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7"><text:span text:style-name="T10">⏳ **Pendientes**</text:span></text:p>
          </table:table-cell>
          <table:table-cell table:style-name="Tabla10.A1" office:value-type="string">
            <text:p text:style-name="P17"><text:span text:style-name="T10">Reseñas recibidas que aún no has revisado</text:span></text:p>
          </table:table-cell>
        </table:table-row>
        <table:table-row table:style-name="Tabla10.1">
          <table:table-cell table:style-name="Tabla10.A2" office:value-type="string">
            <text:p text:style-name="P17">✅ <text:span text:style-name="T9">Aprobadas</text:span></text:p>
          </table:table-cell>
          <table:table-cell table:style-name="Tabla10.A2" office:value-type="string">
            <text:p text:style-name="P17">Reseñas visibles en tu página web</text:p>
          </table:table-cell>
        </table:table-row>
        <table:table-row table:style-name="Tabla10.1">
          <table:table-cell table:style-name="Tabla10.A3" office:value-type="string">
            <text:p text:style-name="P17">❌ <text:span text:style-name="T9">Rechazadas</text:span></text:p>
          </table:table-cell>
          <table:table-cell table:style-name="Tabla10.A3" office:value-type="string">
            <text:p text:style-name="P17">Reseñas que decidiste no publicar</text:p>
          </table:table-cell>
        </table:table-row>
      </table:table>
      <text:h text:style-name="P2" text:outline-level="3"><text:bookmark-start text:name="aprobar-o-rechazar-una-reseña"/><text:span text:style-name="T9">Aprobar o rechazar una reseña</text:span><text:bookmark-end text:name="aprobar-o-rechazar-una-reseña"/></text:h>
      <text:p text:style-name="P18">En cada reseña pendiente verás dos botones:</text:p>
      <text:list text:continue-list="list114633877972716" text:style-name="WWNum2">
        <text:list-item>
          <text:p text:style-name="P3"><text:span text:style-name="T9">Aprobar</text:span> — la reseña aparecerá en tu página web inmediatamente</text:p>
        </text:list-item>
        <text:list-item>
          <text:p text:style-name="P3"><text:span text:style-name="T9">Rechazar</text:span> — la reseña queda descartada y no se publica</text:p>
        </text:list-item>
      </text:list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9">💡 Puedes mover una reseña aprobada a rechazada o viceversa si cambias de opinión.</text:p>
          </table:table-cell>
        </table:table-row>
      </table:table>
      <text:p text:style-name="P16"/>
      <text:h text:style-name="P1" text:outline-level="2"><text:bookmark-start text:name="9--campañas-de-email"/><text:span text:style-name="T9">9 · 📧 Campañas de Email</text:span><text:bookmark-end text:name="9--campañas-de-email"/></text:h>
      <text:p text:style-name="P23"><text:span text:style-name="T9">Ruta:</text:span> <text:span text:style-name="T23">petitsalon.cl</text:span><text:span text:style-name="T24">/</text:span><text:span text:style-name="T6">admin/campanas</text:span></text:p>
      <text:p text:style-name="P18">Desde aquí puedes <text:span text:style-name="T9">enviar correos electrónicos a tus clientes</text:span>, ya sea a todos o a un grupo específico.</text:p>
      <text:h text:style-name="P2" text:outline-level="3"><text:bookmark-start text:name="¿para-qué-sirve?"/><text:span text:style-name="T9">¿Para qué sirve?</text:span><text:bookmark-end text:name="¿para-qué-sirve?"/></text:h>
      <text:list text:continue-numbering="true" text:style-name="WWNum2">
        <text:list-item>
          <text:p text:style-name="P3">Avisar de promociones o descuentos</text:p>
        </text:list-item>
        <text:list-item>
          <text:p text:style-name="P3">Informar sobre nuevos servicios</text:p>
        </text:list-item>
        <text:list-item>
          <text:p text:style-name="P3">Comunicar cambios de horario o vacaciones</text:p>
        </text:list-item>
        <text:list-item>
          <text:p text:style-name="P3">Cualquier comunicación masiva que necesites</text:p>
        </text:list-item>
      </text:list>
      <text:h text:style-name="P2" text:outline-level="3"><text:bookmark-start text:name="cómo-crear-y-enviar-una-campaña"/><text:span text:style-name="T9">Cómo crear y enviar una campaña</text:span><text:bookmark-end text:name="cómo-crear-y-enviar-una-campaña"/></text:h>
      <text:p text:style-name="P18"><text:span text:style-name="T9">Paso 1: Escribe el asunto</text:span></text:p>
      <text:p text:style-name="P18">El asunto es la primera línea que verá el cliente en su bandeja de entrada.</text:p>
      <text:p text:style-name="P18"><text:span text:style-name="T9">Paso 2: Escribe el mensaje</text:span></text:p>
      <text:p text:style-name="P18">Usa el editor de texto para dar formato a tu mensaje. Puedes:</text:p>
      <text:list text:continue-numbering="true" text:style-name="WWNum2">
        <text:list-item>
          <text:p text:style-name="P3">Poner texto en <text:span text:style-name="T9">negrita</text:span> o cursiva</text:p>
        </text:list-item>
        <text:list-item>
          <text:p text:style-name="P3">Crear listas con viñetas</text:p>
        </text:list-item>
        <text:list-item>
          <text:p text:style-name="P3">Cambiar el tamaño del texto</text:p>
        </text:list-item>
        <text:list-item>
          <text:p text:style-name="P3"><text:soft-page-break/>Agregar color al texto</text:p>
        </text:list-item>
      </text:list>
      <text:p text:style-name="P18"><text:span text:style-name="T9">Paso 3: Selecciona los destinatarios</text:span></text:p>
      <text:list text:continue-numbering="true" text:style-name="WWNum2">
        <text:list-item>
          <text:p text:style-name="P3"><text:span text:style-name="T9">Todos los clientes</text:span> — envía a quienes tienen email registrado</text:p>
        </text:list-item>
        <text:list-item>
          <text:p text:style-name="P3"><text:span text:style-name="T9">Clientes específicos</text:span> — selecciona individualmente a quién enviar</text:p>
        </text:list-item>
      </text:list>
      <text:p text:style-name="P18"><text:span text:style-name="T9">Paso 4: Enviar</text:span></text:p>
      <text:p text:style-name="P18">Haz clic en <text:span text:style-name="T9">"Enviar campaña"</text:span>. Al finalizar, verás cuántos correos se enviaron correctamente y si hubo algún error.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9">⚠️ <text:span text:style-name="T9">Solo se envía a clientes con email registrado.</text:span> Asegúrate de que tus clientes tengan su correo guardado en el sistema.</text:p>
          </table:table-cell>
        </table:table-row>
      </table:table>
      <text:p text:style-name="P16"/>
      <text:h text:style-name="P1" text:outline-level="2"><text:bookmark-start text:name="10--contenido-del-sitio"/><text:span text:style-name="T9">10 · ⚙️ Contenido del Sitio</text:span><text:bookmark-end text:name="10--contenido-del-sitio"/></text:h>
      <text:p text:style-name="P23"><text:span text:style-name="T9">Ruta:</text:span> <text:span text:style-name="T23">petitsalon.cl</text:span><text:span text:style-name="T24">/</text:span><text:span text:style-name="T6">admin/contenido</text:span></text:p>
      <text:p text:style-name="P18">Aquí editas el <text:span text:style-name="T9">contenido informativo de tu página web pública</text:span>. Todo lo que cambias aquí se refleja en el sitio al instante.</text:p>
      <text:p text:style-name="P18">Tiene cuatro pestañas:</text:p>
      <text:p text:style-name="P16"/>
      <text:h text:style-name="P2" text:outline-level="3"><text:bookmark-start text:name="pestaña:-acerca-de-nosotros"/><text:span text:style-name="T9">Pestaña: Acerca de Nosotros</text:span><text:bookmark-end text:name="pestaña:-acerca-de-nosotros"/></text:h>
      <text:p text:style-name="P18">Edita el texto descriptivo de tu salón que aparece en la página principal.</text:p>
      <text:p text:style-name="P18">También puedes actualizar aquí:</text:p>
      <text:list text:continue-numbering="true" text:style-name="WWNum2">
        <text:list-item>
          <text:p text:style-name="P3"><text:span text:style-name="T9">Número de WhatsApp</text:span> (sin espacios ni guiones, ej: <text:span text:style-name="T6">56937541863</text:span>)</text:p>
        </text:list-item>
        <text:list-item>
          <text:p text:style-name="P3"><text:span text:style-name="T9">Correo electrónico</text:span> de contacto</text:p>
        </text:list-item>
        <text:list-item>
          <text:p text:style-name="P3"><text:span text:style-name="T9">Estacionamiento disponible</text:span> (interruptor sí/no)</text:p>
        </text:list-item>
      </text:list>
      <text:p text:style-name="P16"/>
      <text:h text:style-name="P2" text:outline-level="3"><text:bookmark-start text:name="pestaña:-preguntas-frecuentes-(faq)"/><text:span text:style-name="T9">Pestaña: Preguntas Frecuentes (FAQ)</text:span><text:bookmark-end text:name="pestaña:-preguntas-frecuentes-(faq)"/></text:h>
      <text:p text:style-name="P18">Gestiona las preguntas y respuestas que aparecen en tu página web.</text:p>
      <text:p text:style-name="P18"><text:span text:style-name="T9">Crear una nueva pregunta:</text:span></text:p>
      <text:p text:style-name="P18">Haz clic en <text:span text:style-name="T9">"Nueva Pregunta"</text:span>, escribe la pregunta y su respuesta, y guarda.</text:p>
      <text:p text:style-name="P18"><text:span text:style-name="T9">Editar una pregunta existente:</text:span></text:p>
      <text:p text:style-name="P18">Usa el botón <text:span text:style-name="T9">Editar</text:span> (lápiz) en la pregunta que quieras modificar.</text:p>
      <text:p text:style-name="P18"><text:span text:style-name="T9">Ordenar las preguntas:</text:span></text:p>
      <text:p text:style-name="P18">Usa las flechas ↑ ↓ para cambiar el orden en que aparecen.</text:p>
      <text:p text:style-name="P18"><text:soft-page-break/><text:span text:style-name="T9">Mostrar u ocultar una pregunta:</text:span></text:p>
      <text:p text:style-name="P18">Cada pregunta tiene un interruptor de visibilidad. Puedes ocultar una temporalmente sin borrarla.</text:p>
      <text:p text:style-name="P18"><text:span text:style-name="T9">Eliminar una pregunta:</text:span></text:p>
      <text:p text:style-name="P18">Usa el botón <text:span text:style-name="T9">Borrar</text:span> (papelera). El sistema te pedirá confirmación antes de eliminar.</text:p>
      <text:p text:style-name="P16"/>
      <text:h text:style-name="P2" text:outline-level="3"><text:bookmark-start text:name="pestaña:-cómo-llegar"/><text:span text:style-name="T9">Pestaña: Cómo Llegar</text:span><text:bookmark-end text:name="pestaña:-cómo-llegar"/></text:h>
      <text:p text:style-name="P18">Actualiza la <text:span text:style-name="T9">dirección física</text:span> de tu salón.</text:p>
      <text:p text:style-name="P18">Al guardar, el sistema genera automáticamente una vista previa del mapa de Google Maps para que puedas verificar que la dirección es correcta antes de que aparezca en tu página.</text:p>
      <text:p text:style-name="P16"/>
      <text:h text:style-name="P2" text:outline-level="3"><text:bookmark-start text:name="pestaña:-datos-bancarios"/><text:span text:style-name="T9">Pestaña: Datos Bancarios</text:span><text:bookmark-end text:name="pestaña:-datos-bancarios"/></text:h>
      <text:p text:style-name="P18">Configura los datos de transferencia que se muestran a los clientes al reservar, para que puedan pagar el abono.</text:p>
      <text:p text:style-name="P18">Puedes actualizar:</text:p>
      <text:list text:continue-numbering="true" text:style-name="WWNum2">
        <text:list-item>
          <text:p text:style-name="P3">Nombre del titular de la cuenta</text:p>
        </text:list-item>
        <text:list-item>
          <text:p text:style-name="P3">RUT</text:p>
        </text:list-item>
        <text:list-item>
          <text:p text:style-name="P3">Nombre del banco</text:p>
        </text:list-item>
        <text:list-item>
          <text:p text:style-name="P3">Tipo de cuenta (Corriente, Vista, Ahorro)</text:p>
        </text:list-item>
        <text:list-item>
          <text:p text:style-name="P3">Número de cuenta</text:p>
        </text:list-item>
        <text:list-item>
          <text:p text:style-name="P3">Correo electrónico para recibir comprobantes</text:p>
        </text:list-item>
      </text:list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9">⚠️ <text:span text:style-name="T9">Importante:</text:span> Verifica siempre que los datos bancarios sean correctos antes de guardar, ya que son los que verán tus clientes al reservar.</text:p>
          </table:table-cell>
        </table:table-row>
      </table:table>
      <text:p text:style-name="P16"/>
      <text:h text:style-name="P1" text:outline-level="2"><text:bookmark-start text:name="11--configuración"/><text:span text:style-name="T9">11 · 🔒 Configuración</text:span><text:bookmark-end text:name="11--configuración"/></text:h>
      <text:p text:style-name="P23"><text:span text:style-name="T9">Ruta:</text:span> <text:span text:style-name="T23">petitsalon.cl</text:span><text:span text:style-name="T24">/</text:span><text:span text:style-name="T6">admin/configuracion</text:span></text:p>
      <text:p text:style-name="P18">Aquí puedes <text:span text:style-name="T9">cambiar tu contraseña de acceso</text:span> al panel de administración.</text:p>
      <text:h text:style-name="P2" text:outline-level="3"><text:bookmark-start text:name="cambiar-tu-contraseña"/><text:span text:style-name="T9">Cambiar tu contraseña</text:span><text:bookmark-end text:name="cambiar-tu-contraseña"/></text:h>
      <text:p text:style-name="P18">Para cambiar tu contraseña sigue estos pasos:</text:p>
      <text:list text:style-name="WWNum8">
        <text:list-item text:start-value="1">
          <text:p text:style-name="P9"><text:span text:style-name="T9">Contraseña actual</text:span> — escribe la contraseña que usas actualmente para entrar al panel</text:p>
        </text:list-item>
        <text:list-item>
          <text:p text:style-name="P9"><text:soft-page-break/><text:span text:style-name="T9">Nueva contraseña</text:span> — escribe la nueva contraseña que quieres usar (mínimo 8 caracteres)</text:p>
        </text:list-item>
        <text:list-item>
          <text:p text:style-name="P9"><text:span text:style-name="T9">Confirmar nueva contraseña</text:span> — escribe la nueva contraseña otra vez para verificar que no haya errores de tipeo</text:p>
        </text:list-item>
        <text:list-item>
          <text:p text:style-name="P9">Haz clic en <text:span text:style-name="T9">"Actualizar contraseña"</text:span></text:p>
        </text:list-item>
      </text:list>
      <text:p text:style-name="P18">Si todo está correcto, verás el mensaje: <text:span text:style-name="T9">"Contraseña actualizada exitosamente"</text:span>.</text:p>
      <text:h text:style-name="P2" text:outline-level="3"><text:bookmark-start text:name="errores-posibles"/><text:span text:style-name="T9">Errores posibles</text:span><text:bookmark-end text:name="errores-posibles"/></text:h>
      <table:table table:name="Tabla14" table:style-name="Tabla14">
        <table:table-column table:style-name="Tabla14.A" table:number-columns-repeated="3"/>
        <table:table-row table:style-name="Tabla14.1">
          <table:table-cell table:style-name="Tabla14.A1" office:value-type="string">
            <text:p text:style-name="P17"><text:span text:style-name="T10">*"La contraseña actual es incorrecta"*</text:span></text:p>
          </table:table-cell>
          <table:table-cell table:style-name="Tabla14.A1" office:value-type="string">
            <text:p text:style-name="P17"><text:span text:style-name="T10">La contraseña que escribiste en el primer campo no es la que tienes actualmente</text:span></text:p>
          </table:table-cell>
          <table:table-cell table:style-name="Tabla14.A1" office:value-type="string">
            <text:p text:style-name="P17"><text:span text:style-name="T10">Verifica que la estás escribiendo bien, respetando mayúsculas</text:span></text:p>
          </table:table-cell>
        </table:table-row>
        <table:table-row table:style-name="Tabla14.1">
          <table:table-cell table:style-name="Tabla14.A2" office:value-type="string">
            <text:p text:style-name="P17">"La nueva contraseña y su confirmación no coinciden"</text:p>
          </table:table-cell>
          <table:table-cell table:style-name="Tabla14.A2" office:value-type="string">
            <text:p text:style-name="P17">Los campos 2 y 3 no son iguales</text:p>
          </table:table-cell>
          <table:table-cell table:style-name="Tabla14.A2" office:value-type="string">
            <text:p text:style-name="P17">Vuelve a escribir la nueva contraseña en ambos campos con cuidado</text:p>
          </table:table-cell>
        </table:table-row>
        <table:table-row table:style-name="Tabla14.1">
          <table:table-cell table:style-name="Tabla14.A3" office:value-type="string">
            <text:p text:style-name="P17">"La nueva contraseña debe tener al menos 8 caracteres"</text:p>
          </table:table-cell>
          <table:table-cell table:style-name="Tabla14.A3" office:value-type="string">
            <text:p text:style-name="P17">La contraseña elegida es muy corta</text:p>
          </table:table-cell>
          <table:table-cell table:style-name="Tabla14.A3" office:value-type="string">
            <text:p text:style-name="P17">Elige una contraseña más larga</text:p>
          </table:table-cell>
        </table:table-row>
        <table:table-row table:style-name="Tabla14.1">
          <table:table-cell table:style-name="Tabla14.A4" table:number-columns-spanned="3" office:value-type="string">
            <text:p text:style-name="P19">⚠️ <text:span text:style-name="T9">Importante:</text:span> Después de cambiar tu contraseña, la próxima vez que inicies sesión debes usar la nueva. Guárdala en un lugar seguro.</text:p>
          </table:table-cell>
          <table:covered-table-cell/>
          <table:covered-table-cell/>
        </table:table-row>
        <table:table-row table:style-name="Tabla14.1">
          <table:table-cell table:style-name="Tabla14.A5" table:number-columns-spanned="3" office:value-type="string">
            <text:p text:style-name="P19">💡 <text:span text:style-name="T9">Consejo de seguridad:</text:span> Usa una contraseña que combine letras, números y que no sea fácil de adivinar. Evita usar fechas de nacimiento o nombres propios.</text:p>
          </table:table-cell>
          <table:covered-table-cell/>
          <table:covered-table-cell/>
        </table:table-row>
      </table:table>
      <text:p text:style-name="P16"/>
      <text:h text:style-name="P1" text:outline-level="2"><text:bookmark-start text:name="preguntas-frecuentes-del-sistema"/><text:span text:style-name="T9">Preguntas frecuentes del sistema</text:span><text:bookmark-end text:name="preguntas-frecuentes-del-sistema"/></text:h>
      <text:p text:style-name="P18"><text:span text:style-name="T9">¿Qué pasa si un cliente reserva en Cal.com?</text:span></text:p>
      <text:p text:style-name="P18">Las citas se crean automáticamente en tu panel. No tienes que hacer nada manualmente.</text:p>
      <text:p text:style-name="P18"><text:span text:style-name="T9">¿Puedo usar el panel desde mi celular?</text:span></text:p>
      <text:p text:style-name="P18">Sí. El panel está diseñado especialmente para usarse desde el teléfono.</text:p>
      <text:p text:style-name="P18"><text:span text:style-name="T9">¿Qué pasa si cierro sesión?</text:span></text:p>
      <text:p text:style-name="P23">Solo tienes que volver a ingresar en <text:span text:style-name="T23">petitsalon.cl</text:span><text:span text:style-name="T24">/</text:span><text:span text:style-name="T6">admin/login</text:span> con tu correo y contraseña.</text:p>
      <text:p text:style-name="P18"><text:span text:style-name="T9">¿Las fotos que subo ocupan espacio en mi computadora?</text:span></text:p>
      <text:p text:style-name="P18">No. Las fotos se guardan directamente en la nube (Cloudinary). Tu teléfono o computadora no almacena nada.</text:p>
      <text:p text:style-name="P18"><text:span text:style-name="T9">¿Puedo cambiar mis horarios de atención?</text:span></text:p>
      <text:p text:style-name="P18">Sí, pero los horarios se gestionan desde Cal.com, no desde este panel. Consulta la sección 6 de este manual para ver el paso a paso.</text:p>
      <text:p text:style-name="P16"><text:soft-page-break/></text:p>
      <text:p text:style-name="P18">Manual elaborado para Petit Salón · Versión 1.1 · Mayo 202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222222" loext:opacity="10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222222" loext:opacity="10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318cm" style:contextual-spacing="false"/>
      <style:text-properties fo:color="#42c2ed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529cm" fo:margin-bottom="0.265cm" style:contextual-spacing="false"/>
      <style:text-properties fo:color="#e91e63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423cm" fo:margin-bottom="0.212cm" style:contextual-spacing="false"/>
      <style:text-properties fo:color="#222222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fo:color="#42c2ed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212cm" style:contextual-spacing="false" fo:text-align="end" style:justify-single-word="false"/>
    </style:style>
    <style:style style:name="MP2" style:family="paragraph" style:parent-style-name="Standard">
      <style:paragraph-properties fo:margin-top="0.212cm" fo:margin-bottom="0cm" style:contextual-spacing="false">
        <style:tab-stops>
          <style:tab-stop style:position="16.51cm" style:type="right"/>
        </style:tab-stops>
      </style:paragraph-properties>
    </style:style>
    <style:style style:name="MT1" style:family="text">
      <style:text-properties fo:color="#555555" loext:opacity="100%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5.644cm" fo:margin-bottom="2.54cm" fo:margin-left="2.54cm" fo:margin-right="2.54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text:span text:style-name="MT1">Petit Salón · Manual de Usuario - Panel de Administración</text:span></text:p>
      </style:header>
      <style:footer>
        <text:p text:style-name="MP2"><text:span text:style-name="MT1">Versión 1.1 · Mayo 2026</text:span><text:tab/><text:span text:style-name="MT1">Página </text:span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5-26T03:57:09.482000000</meta:creation-date>
    <dc:date>2026-06-16T11:46:31.625671927</dc:date>
    <meta:editing-duration>PT4M48S</meta:editing-duration>
    <meta:document-statistic meta:table-count="14" meta:image-count="0" meta:object-count="0" meta:page-count="15" meta:paragraph-count="324" meta:word-count="3063" meta:character-count="18210" meta:non-whitespace-character-count="15543"/>
    <meta:generator>LibreOffice/24.2.7.2$Linux_X86_64 LibreOffice_project/420$Build-2</meta:generator>
  </office:meta>
</office:document-meta>
</file>